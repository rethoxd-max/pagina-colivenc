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T1" style:family="text">
      <style:text-properties officeooo:rsid="0013c54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[Portada]</text:h>
      <text:p text:style-name="Text_20_body"><text:span text:style-name="Strong_20_Emphasis">Título:</text:span> <text:span text:style-name="Strong_20_Emphasis">Desarrollo de una </text:span><text:span text:style-name="Strong_20_Emphasis"><text:span text:style-name="T1">la página deportiva de un club de atletismo</text:span></text:span></text:p>
      <text:p text:style-name="Text_20_body"><text:span text:style-name="Strong_20_Emphasis">Autor:</text:span> Pablo</text:p>
      <text:p text:style-name="Text_20_body"><text:span text:style-name="Strong_20_Emphasis">Centro y Carrera:</text:span> </text:p>
      <text:p text:style-name="Text_20_body"><text:span text:style-name="Strong_20_Emphasis">Tutor:</text:span> </text:p>
      <text:p text:style-name="Text_20_body"><text:span text:style-name="Strong_20_Emphasis">Fecha:</text:span> </text:p>
      <text:h text:style-name="Heading_20_1" text:outline-level="1">Índice</text:h>
      <text:list text:style-name="L1">
        <text:list-item>
          <text:p text:style-name="P2">Introducción</text:p>
        </text:list-item>
        <text:list-item>
          <text:p text:style-name="P2">Gestión de Competiciones 2.1. Inscripciones 2.2. Pruebas y Categorías</text:p>
        </text:list-item>
        <text:list-item>
          <text:p text:style-name="P2">Sistema de Entrenamientos 3.1. Grupos de Entrenamiento 3.2. Calendario 3.3. Gestión de Sesiones</text:p>
        </text:list-item>
        <text:list-item>
          <text:p text:style-name="P2">Seguridad 4.1. Autenticación y Autorización 4.2. Gestión de Sesiones 4.3. Protección de Datos</text:p>
        </text:list-item>
        <text:list-item>
          <text:p text:style-name="P2">Pruebas y Validación 5.1. Pruebas Unitarias 5.2. Pruebas de Integración 5.3. Pruebas de Usuario</text:p>
        </text:list-item>
        <text:list-item>
          <text:p text:style-name="P2">Despliegue 6.1. Preparación del Entorno 6.2. Configuración de Servidores 6.3. Proceso de Despliegue</text:p>
        </text:list-item>
        <text:list-item>
          <text:p text:style-name="P2">Conclusiones y Trabajo Futuro</text:p>
        </text:list-item>
        <text:list-item>
          <text:p text:style-name="P2">Bibliografía</text:p>
        </text:list-item>
        <text:list-item>
          <text:p text:style-name="P2">Anexos</text:p>
        </text:list-item>
      </text:list>
      <text:h text:style-name="Heading_20_1" text:outline-level="1">1. Introducción</text:h>
      <text:p text:style-name="Text_20_body">En este trabajo se presenta el desarrollo de una plataforma integral para la gestión deportiva, enfocada en la administración de competiciones, entrenamientos y la implementación de medidas de seguridad robusta. Se detalla la arquitectura del sistema, las pruebas realizadas, el proceso de despliegue y se establecen las líneas futuras de mejora.</text:p>
      <text:h text:style-name="Heading_20_1" text:outline-level="1">2. Gestión de Competiciones</text:h>
      <text:h text:style-name="Heading_20_2" text:outline-level="2">2.1. Inscripciones</text:h>
      <text:list text:style-name="L2">
        <text:list-item>
          <text:p text:style-name="P3">Proceso de inscripción online</text:p>
        </text:list-item>
        <text:list-item>
          <text:p text:style-name="P3">Validación de requisitos</text:p>
        </text:list-item>
        <text:list-item>
          <text:p text:style-name="P3"><text:soft-page-break/>Gestión de pagos</text:p>
        </text:list-item>
        <text:list-item>
          <text:p text:style-name="P3">Confirmaciones automáticas</text:p>
        </text:list-item>
      </text:list>
      <text:h text:style-name="Heading_20_2" text:outline-level="2">2.2. Pruebas y Categorías</text:h>
      <text:list text:style-name="L3">
        <text:list-item>
          <text:p text:style-name="P4">Configuración de pruebas</text:p>
        </text:list-item>
        <text:list-item>
          <text:p text:style-name="P4">Asignación de categorías</text:p>
        </text:list-item>
        <text:list-item>
          <text:p text:style-name="P4">Límites de participación</text:p>
        </text:list-item>
        <text:list-item>
          <text:p text:style-name="P4">Gestión de horarios</text:p>
        </text:list-item>
      </text:list>
      <text:h text:style-name="Heading_20_1" text:outline-level="1">3. Sistema de Entrenamientos</text:h>
      <text:h text:style-name="Heading_20_2" text:outline-level="2">3.1. Grupos de Entrenamiento</text:h>
      <text:list text:style-name="L4">
        <text:list-item>
          <text:p text:style-name="P5">Creación y gestión de grupos</text:p>
        </text:list-item>
        <text:list-item>
          <text:p text:style-name="P5">Asignación de entrenadores</text:p>
        </text:list-item>
        <text:list-item>
          <text:p text:style-name="P5">Control de asistencia</text:p>
        </text:list-item>
        <text:list-item>
          <text:p text:style-name="P5">Evaluación de progreso</text:p>
        </text:list-item>
      </text:list>
      <text:h text:style-name="Heading_20_2" text:outline-level="2">3.2. Calendario</text:h>
      <text:list text:style-name="L5">
        <text:list-item>
          <text:p text:style-name="P6">Programación de sesiones</text:p>
        </text:list-item>
        <text:list-item>
          <text:p text:style-name="P6">Gestión de horarios</text:p>
        </text:list-item>
        <text:list-item>
          <text:p text:style-name="P6">Notificaciones automáticas</text:p>
        </text:list-item>
        <text:list-item>
          <text:p text:style-name="P6">Recordatorios de eventos</text:p>
        </text:list-item>
      </text:list>
      <text:h text:style-name="Heading_20_2" text:outline-level="2">3.3. Gestión de Sesiones</text:h>
      <text:list text:style-name="L6">
        <text:list-item>
          <text:p text:style-name="P7">Planificación de entrenamientos</text:p>
        </text:list-item>
        <text:list-item>
          <text:p text:style-name="P7">Registro de actividades</text:p>
        </text:list-item>
        <text:list-item>
          <text:p text:style-name="P7">Seguimiento de objetivos</text:p>
        </text:list-item>
        <text:list-item>
          <text:p text:style-name="P7">Evaluación de resultados</text:p>
        </text:list-item>
      </text:list>
      <text:h text:style-name="Heading_20_1" text:outline-level="1"><text:soft-page-break/>4. Seguridad</text:h>
      <text:h text:style-name="Heading_20_2" text:outline-level="2">4.1. Autenticación y Autorización</text:h>
      <text:p text:style-name="Text_20_body">Se implementa una seguridad robusta para proteger el acceso al sistema. Por ejemplo, se utiliza un middleware de autenticación para validar los tokens JWT y garantizar que sólo los usuarios autorizados accedan a los recursos:</text:p>
      <text:p text:style-name="Text_20_body">javascript</text:p>
      <text:p text:style-name="Preformatted_20_Text"><text:span text:style-name="Source_20_Text">// Middleware de autenticación</text:span></text:p>
      <text:p text:style-name="Preformatted_20_Text"><text:span text:style-name="Source_20_Text">const authMiddleware = async (req, res, next) =&gt;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token = req.header('Authorization').replace('Bearer ', '');</text:span></text:p>
      <text:p text:style-name="Preformatted_20_Text"><text:span text:style-name="Source_20_Text"><text:s text:c="4"/>const decoded = jwt.verify(token, process.env.JWT_SECRET);</text:span></text:p>
      <text:p text:style-name="Preformatted_20_Text"><text:span text:style-name="Source_20_Text"><text:s text:c="4"/>const user = await User.findOne({ _id: decoded._id });</text:span></text:p>
      <text:p text:style-name="Preformatted_20_Text"><text:span text:style-name="Source_20_Text"><text:s text:c="4"/>if (!user) throw new Error();</text:span></text:p>
      <text:p text:style-name="Preformatted_20_Text"><text:span text:style-name="Source_20_Text"><text:s text:c="4"/>req.user = user;</text:span></text:p>
      <text:p text:style-name="Preformatted_20_Text"><text:span text:style-name="Source_20_Text"><text:s text:c="4"/>next();</text:span></text:p>
      <text:p text:style-name="Preformatted_20_Text"><text:span text:style-name="Source_20_Text"><text:s text:c="2"/>} catch (error) {</text:span></text:p>
      <text:p text:style-name="Preformatted_20_Text"><text:span text:style-name="Source_20_Text"><text:s text:c="4"/>res.status(401).send({ error: 'Please authenticate.' });</text:span></text:p>
      <text:p text:style-name="Preformatted_20_Text"><text:span text:style-name="Source_20_Text"><text:s text:c="2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Control de acceso basado en roles</text:span></text:p>
      <text:p text:style-name="Preformatted_20_Text"><text:span text:style-name="Source_20_Text">const roleMiddleware = (allowedRoles) =&gt; {</text:span></text:p>
      <text:p text:style-name="Preformatted_20_Text"><text:span text:style-name="Source_20_Text"><text:s text:c="2"/>return (req, res, next) =&gt; {</text:span></text:p>
      <text:p text:style-name="Preformatted_20_Text"><text:span text:style-name="Source_20_Text"><text:s text:c="4"/>if (!req.user.userTypes.some(role =&gt; allowedRoles.includes(role))) {</text:span></text:p>
      <text:p text:style-name="Preformatted_20_Text"><text:span text:style-name="Source_20_Text"><text:s text:c="6"/>return res.status(403).json({ message: 'Access denied' }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next();</text:span></text:p>
      <text:p text:style-name="Preformatted_20_Text"><text:span text:style-name="Source_20_Text"><text:s text:c="2"/>};</text:span></text:p>
      <text:p text:style-name="P1"><text:span text:style-name="Source_20_Text">};</text:span></text:p>
      <text:h text:style-name="Heading_20_2" text:outline-level="2">4.2. Gestión de Sesiones</text:h>
      <text:list text:style-name="L7">
        <text:list-item>
          <text:p text:style-name="P8">Tokens JWT</text:p>
        </text:list-item>
        <text:list-item>
          <text:p text:style-name="P8">Renovación automática</text:p>
        </text:list-item>
        <text:list-item>
          <text:p text:style-name="P8">Control de sesiones activas</text:p>
        </text:list-item>
        <text:list-item>
          <text:p text:style-name="P8">Cierre de sesión seguro</text:p>
        </text:list-item>
      </text:list>
      <text:h text:style-name="Heading_20_2" text:outline-level="2">4.3. Protección de Datos</text:h>
      <text:list text:style-name="L8">
        <text:list-item>
          <text:p text:style-name="P9">Encriptación de datos sensibles</text:p>
        </text:list-item>
        <text:list-item>
          <text:p text:style-name="P9">Validación de entrada</text:p>
        </text:list-item>
        <text:list-item>
          <text:p text:style-name="P9">Sanitización de datos</text:p>
        </text:list-item>
        <text:list-item>
          <text:p text:style-name="P9">Protección contra inyecciones</text:p>
        </text:list-item>
      </text:list>
      <text:h text:style-name="Heading_20_1" text:outline-level="1"><text:soft-page-break/>5. Pruebas y Validación</text:h>
      <text:h text:style-name="Heading_20_2" text:outline-level="2">5.1. Pruebas Unitarias</text:h>
      <text:p text:style-name="Text_20_body">Se desarrollan pruebas unitarias para asegurar que cada módulo funcione correctamente. Por ejemplo, en el servicio de autenticación se verifican los casos de uso para usuarios válidos e inválidos, y en el servicio de ranking se comprueba que los resultados se ordenen correctamente:</text:p>
      <text:p text:style-name="Text_20_body">typescript</text:p>
      <text:p text:style-name="Preformatted_20_Text"><text:span text:style-name="Source_20_Text">describe('AuthService', () =&gt; {</text:span></text:p>
      <text:p text:style-name="Preformatted_20_Text"><text:span text:style-name="Source_20_Text"><text:s text:c="2"/>it('should authenticate valid user', async () =&gt; {</text:span></text:p>
      <text:p text:style-name="Preformatted_20_Text"><text:span text:style-name="Source_20_Text"><text:s text:c="4"/>const result = await authService.login(validCredentials);</text:span></text:p>
      <text:p text:style-name="Preformatted_20_Text"><text:span text:style-name="Source_20_Text"><text:s text:c="4"/>expect(result.token).toBeDefined();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it('should reject invalid credentials', async () =&gt; {</text:span></text:p>
      <text:p text:style-name="Preformatted_20_Text"><text:span text:style-name="Source_20_Text"><text:s text:c="4"/>await expect(authService.login(invalidCredentials))</text:span></text:p>
      <text:p text:style-name="Preformatted_20_Text"><text:span text:style-name="Source_20_Text"><text:s text:c="6"/>.rejects.toThrow('Invalid credentials');</text:span></text:p>
      <text:p text:style-name="Preformatted_20_Text"><text:span text:style-name="Source_20_Text"><text:s text:c="2"/>}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describe('RankingService', () =&gt; {</text:span></text:p>
      <text:p text:style-name="Preformatted_20_Text"><text:span text:style-name="Source_20_Text"><text:s text:c="2"/>it('should return sorted rankings', async () =&gt; {</text:span></text:p>
      <text:p text:style-name="Preformatted_20_Text"><text:span text:style-name="Source_20_Text"><text:s text:c="4"/>const rankings = await rankingService.getRankingByCategoria(categoriaId);</text:span></text:p>
      <text:p text:style-name="Preformatted_20_Text"><text:span text:style-name="Source_20_Text"><text:s text:c="4"/>expect(rankings).toBeSorted((a, b) =&gt; b.valor - a.valor);</text:span></text:p>
      <text:p text:style-name="Preformatted_20_Text"><text:span text:style-name="Source_20_Text"><text:s text:c="2"/>});</text:span></text:p>
      <text:p text:style-name="P1"><text:span text:style-name="Source_20_Text">});</text:span></text:p>
      <text:h text:style-name="Heading_20_2" text:outline-level="2">5.2. Pruebas de Integración</text:h>
      <text:list text:style-name="L9">
        <text:list-item>
          <text:p text:style-name="P10">Evaluación de flujos completos de usuario</text:p>
        </text:list-item>
        <text:list-item>
          <text:p text:style-name="P10">Integración entre módulos</text:p>
        </text:list-item>
        <text:list-item>
          <text:p text:style-name="P10">Pruebas de API</text:p>
        </text:list-item>
        <text:list-item>
          <text:p text:style-name="P10">Validación de datos</text:p>
        </text:list-item>
      </text:list>
      <text:h text:style-name="Heading_20_2" text:outline-level="2">5.3. Pruebas de Usuario</text:h>
      <text:list text:style-name="L10">
        <text:list-item>
          <text:p text:style-name="P11">Casos de uso principales</text:p>
        </text:list-item>
        <text:list-item>
          <text:p text:style-name="P11">Evaluación de la interfaz de usuario</text:p>
        </text:list-item>
        <text:list-item>
          <text:p text:style-name="P11">Experiencia de usuario (UX)</text:p>
        </text:list-item>
        <text:list-item>
          <text:p text:style-name="P11">Análisis del rendimiento</text:p>
        </text:list-item>
      </text:list>
      <text:h text:style-name="Heading_20_1" text:outline-level="1"><text:soft-page-break/>6. Despliegue</text:h>
      <text:h text:style-name="Heading_20_2" text:outline-level="2">6.1. Preparación del Entorno</text:h>
      <text:p text:style-name="Text_20_body">Para el despliegue se configura el entorno de producción mediante variables de entorno, se instalan las dependencias y se utiliza PM2 para la gestión del proceso:</text:p>
      <text:p text:style-name="Text_20_body">bash</text:p>
      <text:p text:style-name="Preformatted_20_Text"><text:span text:style-name="Source_20_Text"># Configuración de variables de entorno</text:span></text:p>
      <text:p text:style-name="Preformatted_20_Text"><text:span text:style-name="Source_20_Text">PORT=5000</text:span></text:p>
      <text:p text:style-name="Preformatted_20_Text"><text:span text:style-name="Source_20_Text">MONGO_URI=mongodb://localhost:27017/sports_db</text:span></text:p>
      <text:p text:style-name="Preformatted_20_Text"><text:span text:style-name="Source_20_Text">JWT_SECRET=your_jwt_secret</text:span></text:p>
      <text:p text:style-name="Preformatted_20_Text"><text:span text:style-name="Source_20_Text">NODE_ENV=production</text:span></text:p>
      <text:p text:style-name="Preformatted_20_Text"/>
      <text:p text:style-name="Preformatted_20_Text"><text:span text:style-name="Source_20_Text"># Instalación de dependencias</text:span></text:p>
      <text:p text:style-name="Preformatted_20_Text"><text:span text:style-name="Source_20_Text">npm install</text:span></text:p>
      <text:p text:style-name="Preformatted_20_Text"><text:span text:style-name="Source_20_Text">npm run build</text:span></text:p>
      <text:p text:style-name="Preformatted_20_Text"/>
      <text:p text:style-name="Preformatted_20_Text"><text:span text:style-name="Source_20_Text"># Configuración de PM2</text:span></text:p>
      <text:p text:style-name="P1"><text:span text:style-name="Source_20_Text">pm2 start index.js --name sports-app</text:span></text:p>
      <text:h text:style-name="Heading_20_2" text:outline-level="2">6.2. Configuración de Servidores</text:h>
      <text:list text:style-name="L11">
        <text:list-item>
          <text:p text:style-name="P12">Servidor Node.js</text:p>
        </text:list-item>
        <text:list-item>
          <text:p text:style-name="P12">Base de datos MongoDB</text:p>
        </text:list-item>
        <text:list-item>
          <text:p text:style-name="P12">Servidor web (Nginx)</text:p>
        </text:list-item>
        <text:list-item>
          <text:p text:style-name="P12">Certificados SSL</text:p>
        </text:list-item>
      </text:list>
      <text:h text:style-name="Heading_20_2" text:outline-level="2">6.3. Proceso de Despliegue</text:h>
      <text:list text:style-name="L12">
        <text:list-item>
          <text:p text:style-name="P13">Build de producción</text:p>
        </text:list-item>
        <text:list-item>
          <text:p text:style-name="P13">Migración de datos</text:p>
        </text:list-item>
        <text:list-item>
          <text:p text:style-name="P13">Configuración de dominios</text:p>
        </text:list-item>
        <text:list-item>
          <text:p text:style-name="P13">Monitorización inicial</text:p>
        </text:list-item>
      </text:list>
      <text:h text:style-name="Heading_20_1" text:outline-level="1">7. Conclusiones y Trabajo Futuro</text:h>
      <text:h text:style-name="Heading_20_2" text:outline-level="2">7.1. Objetivos Alcanzados</text:h>
      <text:list text:style-name="L13">
        <text:list-item>
          <text:p text:style-name="P14">Sistema completo de gestión deportiva</text:p>
        </text:list-item>
        <text:list-item>
          <text:p text:style-name="P14">Interfaz intuitiva y responsive</text:p>
        </text:list-item>
        <text:list-item>
          <text:p text:style-name="P14">Gestión eficiente de datos</text:p>
        </text:list-item>
        <text:list-item>
          <text:p text:style-name="P14">Sistema seguro y escalable</text:p>
        </text:list-item>
      </text:list>
      <text:h text:style-name="Heading_20_2" text:outline-level="2"><text:soft-page-break/>7.2. Dificultades Encontradas</text:h>
      <text:list text:style-name="L14">
        <text:list-item>
          <text:p text:style-name="P15">Complejidad en los cálculos de rankings</text:p>
        </text:list-item>
        <text:list-item>
          <text:p text:style-name="P15">Gestión de concurrencia</text:p>
        </text:list-item>
        <text:list-item>
          <text:p text:style-name="P15">Optimización de consultas</text:p>
        </text:list-item>
        <text:list-item>
          <text:p text:style-name="P15">Manejo de sesiones múltiples</text:p>
        </text:list-item>
      </text:list>
      <text:h text:style-name="Heading_20_2" text:outline-level="2">7.3. Lecciones Aprendidas</text:h>
      <text:list text:style-name="L15">
        <text:list-item>
          <text:p text:style-name="P16">Importancia del diseño modular</text:p>
        </text:list-item>
        <text:list-item>
          <text:p text:style-name="P16">Valor de las pruebas automatizadas</text:p>
        </text:list-item>
        <text:list-item>
          <text:p text:style-name="P16">Necesidad de una documentación clara</text:p>
        </text:list-item>
        <text:list-item>
          <text:p text:style-name="P16">Beneficios de la arquitectura REST</text:p>
        </text:list-item>
      </text:list>
      <text:h text:style-name="Heading_20_2" text:outline-level="2">7.4. Líneas Futuras de Desarrollo</text:h>
      <text:list text:style-name="L16">
        <text:list-item>
          <text:p text:style-name="P17">Implementación de análisis estadístico avanzado</text:p>
        </text:list-item>
        <text:list-item>
          <text:p text:style-name="P17">Integración con dispositivos wearables</text:p>
        </text:list-item>
        <text:list-item>
          <text:p text:style-name="P17">Sistema de notificaciones en tiempo real</text:p>
        </text:list-item>
        <text:list-item>
          <text:p text:style-name="P17">Módulo de análisis de rendimiento</text:p>
        </text:list-item>
      </text:list>
      <text:h text:style-name="Heading_20_1" text:outline-level="1">8. Bibliografía</text:h>
      <text:list text:style-name="L17">
        <text:list-item>
          <text:p text:style-name="P18">Angular Documentation. https://angular.io/docs</text:p>
        </text:list-item>
        <text:list-item>
          <text:p text:style-name="P18">MongoDB Manual. https://docs.mongodb.com/manual/</text:p>
        </text:list-item>
        <text:list-item>
          <text:p text:style-name="P18">Node.js Documentation. https://nodejs.org/en/docs/</text:p>
        </text:list-item>
        <text:list-item>
          <text:p text:style-name="P18">Express.js Guide. https://expressjs.com/en/guide/routing.html</text:p>
        </text:list-item>
        <text:list-item>
          <text:p text:style-name="P18">JWT Authentication. https://jwt.io/introduction/</text:p>
        </text:list-item>
        <text:list-item>
          <text:p text:style-name="P18">Material Design Guidelines. https://material.io/design</text:p>
        </text:list-item>
      </text:list>
      <text:h text:style-name="Heading_20_1" text:outline-level="1">9. Anexos</text:h>
      <text:p text:style-name="Text_20_body"><text:span text:style-name="Strong_20_Emphasis">Anexo A:</text:span> Manual de instalación &amp;nbsp;&amp;nbsp;&amp;nbsp;&amp;nbsp;[Instrucciones detalladas de instalación y configuración]</text:p>
      <text:p text:style-name="Text_20_body"><text:span text:style-name="Strong_20_Emphasis">Anexo B:</text:span> Manual de usuario &amp;nbsp;&amp;nbsp;&amp;nbsp;&amp;nbsp;[Guía completa de uso del sistema]</text:p>
      <text:p text:style-name="Text_20_body"><text:span text:style-name="Strong_20_Emphasis">Anexo C:</text:span> Documentación de la API &amp;nbsp;&amp;nbsp;&amp;nbsp;&amp;nbsp;[Documentación detallada de endpoints y modelos]</text:p>
      <text:p text:style-name="Text_20_body"><text:soft-page-break/><text:span text:style-name="Strong_20_Emphasis">Anexo D:</text:span> Glosario de términos &amp;nbsp;&amp;nbsp;&amp;nbsp;&amp;nbsp;[Definiciones de términos técnicos y deportivos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3T21:39:49.544000000</meta:creation-date>
    <dc:date>2025-04-13T21:53:52.656000000</dc:date>
    <meta:editing-duration>PT14M3S</meta:editing-duration>
    <meta:editing-cycles>1</meta:editing-cycles>
    <meta:document-statistic meta:table-count="0" meta:image-count="0" meta:object-count="0" meta:page-count="7" meta:paragraph-count="168" meta:word-count="866" meta:character-count="6190" meta:non-whitespace-character-count="5471"/>
    <meta:generator>LibreOffice/7.4.3.2$Windows_X86_64 LibreOffice_project/1048a8393ae2eeec98dff31b5c133c5f1d08b890</meta:generator>
  </office:meta>
</office:document-meta>
</file>